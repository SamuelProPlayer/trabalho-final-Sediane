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900000197B4C5374A.png" manifest:media-type="image/png"/>
  <manifest:file-entry manifest:full-path="Pictures/100000010000030B00000132B5DB1CA2.png" manifest:media-type="image/png"/>
  <manifest:file-entry manifest:full-path="Pictures/100000010000031F000000DF4FC688C3.png" manifest:media-type="image/png"/>
  <manifest:file-entry manifest:full-path="Pictures/100000010000031F000000DF20151396.png" manifest:media-type="image/png"/>
  <manifest:file-entry manifest:full-path="Pictures/100000010000031C0000011A24CA224F.png" manifest:media-type="image/png"/>
  <manifest:file-entry manifest:full-path="Pictures/10000001000003360000008569B289D5.png" manifest:media-type="image/png"/>
  <manifest:file-entry manifest:full-path="Pictures/100000010000034D000001B1F530CE00.png" manifest:media-type="image/png"/>
  <manifest:file-entry manifest:full-path="Pictures/100000010000034D000001B167A89F3B.png" manifest:media-type="image/png"/>
  <manifest:file-entry manifest:full-path="Pictures/100000010000033600000085787BFD6A.png" manifest:media-type="image/png"/>
  <manifest:file-entry manifest:full-path="Pictures/10000001000001E00000010EC92C3D7D.png" manifest:media-type="image/png"/>
  <manifest:file-entry manifest:full-path="Pictures/100000010000031A00000176B7F783F3.png" manifest:media-type="image/png"/>
  <manifest:file-entry manifest:full-path="Pictures/100000010000034D000001B1FDA4F5B3.png" manifest:media-type="image/png"/>
  <manifest:file-entry manifest:full-path="Pictures/10000001000001DE000000C31F762341.png" manifest:media-type="image/png"/>
  <manifest:file-entry manifest:full-path="Pictures/100000010000034000000210C0C746C9.png" manifest:media-type="image/png"/>
  <manifest:file-entry manifest:full-path="Pictures/100000010000032E0000004BBFEFE390.png" manifest:media-type="image/png"/>
  <manifest:file-entry manifest:full-path="Pictures/10000001000003580000015E77A057E2.png" manifest:media-type="image/png"/>
  <manifest:file-entry manifest:full-path="Pictures/100000010000031100000181C59131B7.png" manifest:media-type="image/png"/>
  <manifest:file-entry manifest:full-path="Pictures/10000001000002FF00000072268EF9DD.png" manifest:media-type="image/png"/>
  <manifest:file-entry manifest:full-path="Pictures/100000010000031D000001FE8A0CF95C.png" manifest:media-type="image/png"/>
  <manifest:file-entry manifest:full-path="Pictures/100000010000031F000001E084D603A9.png" manifest:media-type="image/png"/>
  <manifest:file-entry manifest:full-path="Pictures/100000010000034A000002123D980612.png" manifest:media-type="image/png"/>
  <manifest:file-entry manifest:full-path="Pictures/1000000100000349000000B456126BCF.png" manifest:media-type="image/png"/>
  <manifest:file-entry manifest:full-path="Pictures/100000010000034000000210D6EDAA3A.png" manifest:media-type="image/png"/>
  <manifest:file-entry manifest:full-path="Pictures/10000001000003400000021003E289A5.png" manifest:media-type="image/png"/>
  <manifest:file-entry manifest:full-path="Pictures/1000000100000321000001A9B99D6310.png" manifest:media-type="image/png"/>
  <manifest:file-entry manifest:full-path="Pictures/10000001000001E00000010E7D4B9F86.png" manifest:media-type="image/png"/>
  <manifest:file-entry manifest:full-path="Pictures/100000010000034000000210CA0492B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Standard">
      <style:paragraph-properties fo:text-align="center" style:justify-single-word="false"/>
      <style:text-properties fo:font-variant="normal" fo:text-transform="none" fo:color="#000000" loext:opacity="100%" style:font-name="arial" fo:font-size="12pt" fo:letter-spacing="normal" fo:font-style="normal" fo:font-weight="normal" officeooo:rsid="0003a9f6" officeooo:paragraph-rsid="0003a9f6"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arial" fo:font-size="12pt" fo:font-weight="normal" officeooo:rsid="0003a9f6" officeooo:paragraph-rsid="0003a9f6"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arial" fo:font-size="12pt" fo:font-weight="normal" officeooo:paragraph-rsid="0003a9f6"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arial" fo:font-size="12pt" fo:font-weight="bold" officeooo:rsid="0003a9f6" officeooo:paragraph-rsid="0003a9f6"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arial" fo:font-size="12pt" fo:font-weight="bold" officeooo:paragraph-rsid="000a7343" style:font-size-asian="12pt" style:font-weight-asian="bold" style:font-size-complex="12pt" style:font-weight-complex="bold"/>
    </style:style>
    <style:style style:name="P6" style:family="paragraph" style:parent-style-name="Standard">
      <style:paragraph-properties fo:text-align="center" style:justify-single-word="false"/>
      <style:text-properties style:font-name="arial" fo:font-size="12pt" fo:font-weight="bold" officeooo:paragraph-rsid="0003a9f6" style:font-size-asian="12pt" style:font-size-complex="12pt"/>
    </style:style>
    <style:style style:name="P7" style:family="paragraph" style:parent-style-name="Heading_20_3">
      <style:paragraph-properties fo:margin-top="0cm" fo:margin-bottom="0.247cm" style:contextual-spacing="false" fo:line-height="114%"/>
      <style:text-properties style:font-name="Google Sans"/>
    </style:style>
    <style:style style:name="P8" style:family="paragraph" style:parent-style-name="Text_20_body">
      <style:paragraph-properties fo:margin-top="0cm" fo:margin-bottom="0.247cm" style:contextual-spacing="false" fo:line-height="114%"/>
      <style:text-properties style:font-name="Google Sans Text"/>
    </style:style>
    <style:style style:name="P9" style:family="paragraph" style:parent-style-name="Text_20_body">
      <style:paragraph-properties fo:margin-top="0cm" fo:margin-bottom="0.247cm" style:contextual-spacing="false" fo:line-height="114%" fo:padding="0cm" fo:border="none"/>
      <style:text-properties style:font-name="Google Sans Text"/>
    </style:style>
    <style:style style:name="P10" style:family="paragraph" style:parent-style-name="Text_20_body">
      <style:paragraph-properties fo:margin-top="0cm" fo:margin-bottom="0.247cm" style:contextual-spacing="false" fo:line-height="114%"/>
      <style:text-properties style:font-name="Google Sans Text" fo:font-weight="normal" style:font-weight-asian="normal" style:font-weight-complex="normal"/>
    </style:style>
    <style:style style:name="P11" style:family="paragraph" style:parent-style-name="Text_20_body">
      <style:paragraph-properties fo:margin-top="0cm" fo:margin-bottom="0.247cm" style:contextual-spacing="false" fo:line-height="114%" fo:padding="0cm" fo:border="none"/>
    </style:style>
    <style:style style:name="P12" style:family="paragraph" style:parent-style-name="Heading_20_3">
      <style:paragraph-properties fo:text-align="start" style:justify-single-word="false" style:writing-mode="lr-tb"/>
      <style:text-properties fo:color="#1f1f1f" loext:opacity="100%" style:font-name="Google Sans" officeooo:paragraph-rsid="003b30fc"/>
    </style:style>
    <style:style style:name="P13" style:family="paragraph" style:parent-style-name="Standard">
      <style:paragraph-properties fo:text-align="start" style:justify-single-word="false" style:writing-mode="lr-tb"/>
      <style:text-properties style:font-name="arial" fo:font-size="12pt" officeooo:rsid="0005613b" officeooo:paragraph-rsid="0005613b" style:font-size-asian="12pt" style:font-size-complex="12pt"/>
    </style:style>
    <style:style style:name="P14" style:family="paragraph" style:parent-style-name="Standard">
      <style:paragraph-properties fo:text-align="start" style:justify-single-word="false" style:writing-mode="lr-tb"/>
      <style:text-properties style:font-name="arial" fo:font-size="12pt" fo:font-weight="bold" officeooo:rsid="000a7343" officeooo:paragraph-rsid="000a7343" style:font-size-asian="12pt" style:font-weight-asian="bold" style:font-size-complex="12pt" style:font-weight-complex="bold"/>
    </style:style>
    <style:style style:name="P15" style:family="paragraph" style:parent-style-name="Standard">
      <style:paragraph-properties fo:text-align="start" style:justify-single-word="false" style:writing-mode="lr-tb"/>
      <style:text-properties officeooo:paragraph-rsid="000a7343"/>
    </style:style>
    <style:style style:name="P16" style:family="paragraph" style:parent-style-name="Standard">
      <style:paragraph-properties fo:text-align="start" style:justify-single-word="false" style:writing-mode="lr-tb"/>
      <style:text-properties officeooo:paragraph-rsid="003b30fc"/>
    </style:style>
    <style:style style:name="P17" style:family="paragraph" style:parent-style-name="Standard">
      <style:paragraph-properties fo:text-align="start" style:justify-single-word="false" style:writing-mode="lr-tb"/>
      <style:text-properties officeooo:paragraph-rsid="0037925d"/>
    </style:style>
    <style:style style:name="P18" style:family="paragraph" style:parent-style-name="Standard">
      <style:paragraph-properties fo:text-align="start" style:justify-single-word="false" style:writing-mode="lr-tb"/>
      <style:text-properties officeooo:paragraph-rsid="0039903a"/>
    </style:style>
    <style:style style:name="P19" style:family="paragraph" style:parent-style-name="Standard">
      <style:paragraph-properties fo:text-align="start" style:justify-single-word="false" style:writing-mode="lr-tb"/>
      <style:text-properties officeooo:paragraph-rsid="003cd026"/>
    </style:style>
    <style:style style:name="P20" style:family="paragraph" style:parent-style-name="Standard">
      <style:paragraph-properties fo:text-align="start" style:justify-single-word="false" style:writing-mode="lr-tb"/>
      <style:text-properties fo:color="#1f1f1f" loext:opacity="100%" style:font-name="arial" officeooo:paragraph-rsid="003b30fc"/>
    </style:style>
    <style:style style:name="P21" style:family="paragraph" style:parent-style-name="Text_20_body" style:list-style-name="L1">
      <style:paragraph-properties fo:margin-left="0cm" fo:margin-right="0cm" fo:margin-top="0cm" fo:margin-bottom="0cm" style:contextual-spacing="false" fo:text-indent="0cm" style:auto-text-indent="false" fo:padding="0cm" fo:border="none"/>
    </style:style>
    <style:style style:name="T1" style:family="text">
      <style:text-properties fo:font-variant="normal" fo:text-transform="none" fo:color="#000000" loext:opacity="100%" style:text-outline="false" style:text-line-through-style="none" style:text-line-through-type="none" fo:letter-spacing="normal" fo:font-style="normal" fo:text-shadow="none" style:text-underline-style="none" fo:font-weight="normal" style:font-style-asian="normal" style:font-weight-asian="normal" style:text-emphasize="none"/>
    </style:style>
    <style:style style:name="T2" style:family="text">
      <style:text-properties fo:font-variant="normal" fo:text-transform="none" fo:color="#000000" loext:opacity="100%" style:text-outline="false" style:text-line-through-style="none" style:text-line-through-type="none" style:font-name="arial" fo:font-size="12pt" fo:letter-spacing="normal" fo:font-style="normal" fo:text-shadow="none" style:text-underline-style="none" fo:font-weight="bold" style:font-style-asian="normal" style:font-weight-asian="bold" style:font-weight-complex="bold" style:text-emphasize="none"/>
    </style:style>
    <style:style style:name="T3" style:family="text">
      <style:text-properties fo:font-variant="normal" fo:text-transform="none" fo:color="#000000" loext:opacity="100%" fo:letter-spacing="normal" fo:font-style="normal" officeooo:rsid="0003a9f6" style:font-weight-asian="bold" style:font-weight-complex="bold"/>
    </style:style>
    <style:style style:name="T4" style:family="text">
      <style:text-properties fo:font-variant="normal" fo:text-transform="none" fo:color="#000000" loext:opacity="100%" fo:letter-spacing="normal" fo:font-style="normal" officeooo:rsid="0003a9f6"/>
    </style:style>
    <style:style style:name="T5" style:family="text">
      <style:text-properties fo:font-variant="normal" fo:text-transform="none" fo:color="#000000" loext:opacity="100%" fo:letter-spacing="normal" fo:font-style="normal" officeooo:rsid="0037925d"/>
    </style:style>
    <style:style style:name="T6" style:family="text">
      <style:text-properties fo:font-variant="normal" fo:text-transform="none" fo:color="#1f1f1f" loext:opacity="100%" style:text-outline="false" style:text-line-through-style="none" style:text-line-through-type="none" fo:letter-spacing="normal" fo:font-style="normal" fo:text-shadow="none" style:text-underline-style="none" fo:font-weight="normal" style:font-style-asian="normal" style:font-weight-asian="normal" style:text-emphasize="none"/>
    </style:style>
    <style:style style:name="T7" style:family="text">
      <style:text-properties fo:font-variant="normal" fo:text-transform="none" fo:color="#1f1f1f" loext:opacity="100%" style:text-outline="false" style:text-line-through-style="none" style:text-line-through-type="none" fo:letter-spacing="normal" fo:font-style="normal" fo:text-shadow="none" style:text-underline-style="none" fo:font-weight="normal" officeooo:rsid="0005613b" style:font-style-asian="normal" style:font-weight-asian="normal" style:text-emphasize="none"/>
    </style:style>
    <style:style style:name="T8" style:family="text">
      <style:text-properties fo:font-variant="normal" fo:text-transform="none" fo:color="#1f1f1f" loext:opacity="100%" style:text-outline="false" style:text-line-through-style="none" style:text-line-through-type="none" style:font-name="arial" fo:font-size="12pt" fo:letter-spacing="normal" fo:font-style="normal" fo:text-shadow="none" style:text-underline-style="none" fo:font-weight="normal" officeooo:rsid="000a7343" style:font-size-asian="12pt" style:font-style-asian="normal" style:font-weight-asian="normal" style:font-size-complex="12pt" style:font-weight-complex="bold" style:text-emphasize="none"/>
    </style:style>
    <style:style style:name="T9" style:family="text">
      <style:text-properties fo:font-variant="normal" fo:text-transform="none" fo:color="#1f1f1f" loext:opacity="100%" style:text-outline="false" style:text-line-through-style="none" style:text-line-through-type="none" style:font-name="arial" fo:font-size="12pt" fo:letter-spacing="normal" fo:font-style="normal" fo:text-shadow="none" style:text-underline-style="none" fo:font-weight="normal" officeooo:rsid="003b30fc" style:font-size-asian="12pt" style:font-style-asian="normal" style:font-weight-asian="normal" style:font-size-complex="12pt" style:font-weight-complex="bold" style:text-emphasize="none"/>
    </style:style>
    <style:style style:name="T10" style:family="text">
      <style:text-properties fo:font-variant="normal" fo:text-transform="none" fo:color="#1f1f1f" loext:opacity="100%" style:text-outline="false" style:text-line-through-style="none" style:text-line-through-type="none" style:font-name="arial" fo:font-size="12pt" fo:letter-spacing="normal" fo:font-style="normal" fo:text-shadow="none" style:text-underline-style="none" fo:font-weight="normal" officeooo:rsid="0039903a" style:font-size-asian="12pt" style:font-style-asian="normal" style:font-weight-asian="normal" style:font-size-complex="12pt" style:font-weight-complex="normal" style:text-emphasize="none"/>
    </style:style>
    <style:style style:name="T11" style:family="text">
      <style:text-properties fo:font-variant="normal" fo:text-transform="none" fo:color="#1f1f1f" loext:opacity="100%" style:text-outline="false" style:text-line-through-style="none" style:text-line-through-type="none" style:font-name="arial" fo:font-size="12pt" fo:letter-spacing="normal" fo:font-style="normal" fo:text-shadow="none" style:text-underline-style="none" fo:font-weight="normal" officeooo:rsid="003cd026" style:font-size-asian="12pt" style:font-style-asian="normal" style:font-weight-asian="normal" style:font-size-complex="12pt" style:font-weight-complex="normal" style:text-emphasize="none"/>
    </style:style>
    <style:style style:name="T12" style:family="text">
      <style:text-properties fo:font-variant="normal" fo:text-transform="none" fo:color="#1f1f1f" loext:opacity="100%" style:text-outline="false" style:text-line-through-style="none" style:text-line-through-type="none" style:font-name="arial" fo:font-size="12pt" fo:letter-spacing="normal" fo:font-style="normal" fo:text-shadow="none" style:text-underline-style="none" fo:font-weight="normal" officeooo:rsid="0037925d" style:font-size-asian="12pt" style:font-style-asian="normal" style:font-weight-asian="normal" style:font-size-complex="12pt" style:font-weight-complex="normal" style:text-emphasize="none"/>
    </style:style>
    <style:style style:name="T13" style:family="text">
      <style:text-properties fo:font-variant="normal" fo:text-transform="none" fo:color="#1f1f1f" loext:opacity="100%" style:text-outline="false" style:text-line-through-style="none" style:text-line-through-type="none" style:font-name="arial" fo:font-size="12pt" fo:letter-spacing="normal" fo:font-style="normal" fo:text-shadow="none" style:text-underline-style="none" fo:font-weight="normal" officeooo:rsid="0039903a" style:text-blinking="false" style:font-size-asian="12pt" style:font-style-asian="normal" style:font-weight-asian="bold" style:font-size-complex="12pt" style:font-weight-complex="bold" style:text-emphasize="none" loext:padding="0cm" loext:border="none"/>
    </style:style>
    <style:style style:name="T14" style:family="text">
      <style:text-properties fo:font-variant="normal" fo:text-transform="none" fo:color="#1f1f1f" loext:opacity="100%" style:text-outline="false" style:text-line-through-style="none" style:text-line-through-type="none" style:font-name="arial" fo:font-size="12pt" fo:letter-spacing="normal" fo:font-style="normal" fo:text-shadow="none" style:text-underline-style="none" fo:font-weight="bold" officeooo:rsid="0037925d" style:font-size-asian="12pt" style:font-style-asian="normal" style:font-weight-asian="bold" style:font-size-complex="12pt" style:font-weight-complex="bold" style:text-emphasize="none"/>
    </style:style>
    <style:style style:name="T15" style:family="text">
      <style:text-properties fo:font-variant="normal" fo:text-transform="none" fo:color="#1f1f1f" loext:opacity="100%" style:text-outline="false" style:text-line-through-style="none" style:text-line-through-type="none" style:font-name="arial" fo:font-size="12pt" fo:letter-spacing="normal" fo:font-style="normal" fo:text-shadow="none" style:text-underline-style="none" fo:font-weight="bold" officeooo:rsid="0039903a" style:font-size-asian="12pt" style:font-style-asian="normal" style:font-weight-asian="bold" style:font-size-complex="12pt" style:font-weight-complex="bold" style:text-emphasize="none"/>
    </style:style>
    <style:style style:name="T16" style:family="text">
      <style:text-properties fo:font-variant="normal" fo:text-transform="none" fo:color="#1f1f1f" loext:opacity="100%" style:text-outline="false" style:text-line-through-style="none" style:text-line-through-type="none" style:font-name="arial" fo:font-size="12pt" fo:letter-spacing="normal" fo:font-style="normal" fo:text-shadow="none" style:text-underline-style="none" fo:font-weight="bold" officeooo:rsid="003cd026" style:font-size-asian="12pt" style:font-style-asian="normal" style:font-weight-asian="bold" style:font-size-complex="12pt" style:font-weight-complex="bold" style:text-emphasize="none"/>
    </style:style>
    <style:style style:name="T17" style:family="text">
      <style:text-properties fo:font-variant="normal" fo:text-transform="none" fo:color="#1f1f1f" loext:opacity="100%" style:text-outline="false" style:text-line-through-style="none" style:text-line-through-type="none" style:font-name="arial" fo:font-size="12pt" fo:letter-spacing="normal" fo:font-style="italic" fo:text-shadow="none" style:text-underline-style="none" fo:font-weight="normal" officeooo:rsid="003cd026" style:font-size-asian="12pt" style:font-style-asian="normal" style:font-weight-asian="normal" style:font-size-complex="12pt" style:font-weight-complex="normal" style:text-emphasize="none"/>
    </style:style>
    <style:style style:name="T18" style:family="text">
      <style:text-properties fo:font-variant="normal" fo:text-transform="none" fo:color="#1f1f1f" loext:opacity="100%" style:text-outline="false" style:text-line-through-style="none" style:text-line-through-type="none" fo:font-size="12pt" fo:letter-spacing="normal" fo:font-style="normal" fo:text-shadow="none" style:text-underline-style="none" fo:font-weight="normal" officeooo:rsid="0039903a" style:font-size-asian="12pt" style:font-style-asian="normal" style:font-weight-asian="normal" style:font-size-complex="12pt" style:font-weight-complex="normal" style:text-emphasize="none"/>
    </style:style>
    <style:style style:name="T19" style:family="text">
      <style:text-properties fo:font-variant="normal" fo:text-transform="none" fo:color="#1f1f1f" loext:opacity="100%" style:text-outline="false" style:text-line-through-style="none" style:text-line-through-type="none" fo:font-size="12pt" fo:letter-spacing="normal" fo:font-style="normal" fo:text-shadow="none" style:text-underline-style="none" fo:font-weight="normal" officeooo:rsid="003cd026" style:font-size-asian="12pt" style:font-style-asian="normal" style:font-weight-asian="normal" style:font-size-complex="12pt" style:font-weight-complex="normal" style:text-emphasize="none"/>
    </style:style>
    <style:style style:name="T20" style:family="text">
      <style:text-properties fo:color="#000000" loext:opacity="1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text-emphasize="none"/>
    </style:style>
    <style:style style:name="T21" style:family="text">
      <style:text-properties style:text-line-through-style="none" style:text-line-through-type="none" style:font-name="arial" fo:font-size="12pt" style:text-underline-style="none" fo:font-weight="bold" style:text-blinking="false" loext:padding="0cm" loext:border="none"/>
    </style:style>
    <style:style style:name="T22" style:family="text">
      <style:text-properties style:text-line-through-style="none" style:text-line-through-type="none" style:font-name="arial" fo:font-size="12pt" style:text-underline-style="none" fo:font-weight="normal" style:text-blinking="false" loext:padding="0cm" loext:border="none"/>
    </style:style>
    <style:style style:name="T23" style:family="text">
      <style:text-properties officeooo:rsid="003b30fc"/>
    </style:style>
    <style:style style:name="T24" style:family="text">
      <style:text-properties fo:font-weight="bold"/>
    </style:style>
    <style:style style:name="T25" style:family="text">
      <style:text-properties fo:font-weight="bold" officeooo:rsid="003b30fc"/>
    </style:style>
    <style:style style:name="T26" style:family="text">
      <style:text-properties fo:font-weight="bold" style:font-weight-asian="bold" style:font-weight-complex="bold"/>
    </style:style>
    <style:style style:name="T27" style:family="text">
      <style:text-properties style:font-name="Google Sans Text"/>
    </style:style>
    <style:style style:name="T28" style:family="text">
      <style:text-properties style:font-name="Google Sans Text" fo:font-weight="bold"/>
    </style:style>
    <style:style style:name="T29" style:family="text">
      <style:text-properties style:font-name="Google Sans Text" fo:font-weight="bold" officeooo:rsid="003b30fc"/>
    </style:style>
    <style:style style:name="T30" style:family="text">
      <style:text-properties fo:font-style="italic"/>
    </style:style>
    <style:style style:name="T31"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NIVERSIDADE TECNOLOGICA FEDERAL DO PARANA</text:p>
      <text:p text:style-name="P4"><text:line-break/></text:p>
      <text:p text:style-name="P4"/>
      <text:p text:style-name="P4"/>
      <text:p text:style-name="P4"/>
      <text:p text:style-name="P4"/>
      <text:p text:style-name="P4"/>
      <text:p text:style-name="P2"/>
      <text:p text:style-name="P2">SAMUEL BINSFELD DE LARA</text:p>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4"><text:s/></text:span><text:span text:style-name="T5">TRABALHO FINAL</text:span></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3"><text:span text:style-name="T4"/></text:p>
      <text:p text:style-name="P1">GUARAPUVA</text:p>
      <text:p text:style-name="P1">2026</text:p>
      <text:p text:style-name="P13" loext:marker-style-name="T20"><text:span text:style-name="T1"/></text:p>
      <text:p text:style-name="P13" loext:marker-style-name="T20"><text:span text:style-name="T1"/></text:p>
      <text:p text:style-name="P13" loext:marker-style-name="T20"><text:span text:style-name="T1"/></text:p>
      <text:p text:style-name="P13" loext:marker-style-name="T20"><text:span text:style-name="T1"/></text:p>
      <text:p text:style-name="P14" loext:marker-style-name="T20"><text:soft-page-break/><text:span text:style-name="T7">U</text:span><text:span text:style-name="T6">niversidade Tecnológica Federal do Paraná</text:span></text:p>
      <text:p text:style-name="P14" loext:marker-style-name="T20"><text:span text:style-name="T6">Curso: Sistemas para Internet</text:span></text:p>
      <text:p text:style-name="P14" loext:marker-style-name="T20"><text:span text:style-name="T6">Disciplina: Fundamentos de sistemas computacionais</text:span></text:p>
      <text:p text:style-name="P15" loext:marker-style-name="T20"><text:span text:style-name="T8">1</text:span><text:span text:style-name="Strong_20_Emphasis"><text:span text:style-name="T2">°</text:span></text:span><text:span text:style-name="Strong_20_Emphasis"><text:span text:style-name="T8"> Semestre</text:span></text:span></text:p>
      <text:p text:style-name="P15" loext:marker-style-name="T20"><text:span text:style-name="Strong_20_Emphasis"><text:span text:style-name="T8"/></text:span></text:p>
      <text:p text:style-name="P16" loext:marker-style-name="T20"><text:span text:style-name="Strong_20_Emphasis"><text:span text:style-name="T9">1- Resumo da parte teorica: </text:span></text:span></text:p>
      <text:h text:style-name="P12" text:outline-level="3" loext:marker-style-name="T20">O que é um Processo?</text:h>
      <text:p text:style-name="P8"><text:span text:style-name="T23">U</text:span><text:span text:style-name="T31">m processo é uma abstração que representa uma instância de um programa em execução. Durante o seu ciclo de vida, ele consome recursos cruciais do sistema, que in</text:span>cluem: </text:p>
      <text:p text:style-name="P9"><text:span text:style-name="T25">P</text:span><text:span text:style-name="T24">rocessador:</text:span> Utilizado para a sua execução efetiva. </text:p>
      <text:p text:style-name="P9"><text:span text:style-name="T25">M</text:span><text:span text:style-name="T24">emória:</text:span> Espaço necessário para o armazenamento de dados e de instruções. </text:p>
      <text:p text:style-name="P9"><text:span text:style-name="T25">D</text:span><text:span text:style-name="T24">ispositivos de E&amp;S:</text:span> Emprego direto ou indireto de componentes de entrada e saída. </text:p>
      <text:p text:style-name="P10"><text:span text:style-name="T23">O</text:span>s processos podem representar tanto a execução de tarefas do próprio usuário quanto tarefas do sistema operacional (conhecidas como <text:span text:style-name="T30">daemons</text:span>, que rodam em segundo plano). </text:p>
      <text:h text:style-name="P12" text:outline-level="3" loext:marker-style-name="T20">Tipos de Processos</text:h>
      <text:p text:style-name="P8"><text:span text:style-name="T23">O</text:span> Linux classifica os processos em três categorias principais baseadas em seu comportamento e aplicação: </text:p>
      <text:p text:style-name="P11"><text:span text:style-name="T29">I</text:span><text:span text:style-name="T28">nterativos:</text:span><text:span text:style-name="T27"> Processos que exigem ação direta e constante do usuário (ex: comando </text:span><text:span text:style-name="Source_20_Text"><text:span text:style-name="T27">fdisk</text:span></text:span><text:span text:style-name="T27">). </text:span></text:p>
      <text:p text:style-name="P9"><text:span text:style-name="T25">B</text:span><text:span text:style-name="T24">atch (Lote):</text:span> Processos que não interagem com o usuário, executando scripts com múltiplos comandos sequenciais de forma automatizada (ex: um script de backup que salva, compacta e envia arquivos para um servidor). </text:p>
      <text:p text:style-name="P9"><text:span text:style-name="T25">T</text:span><text:span text:style-name="T24">empo Real:</text:span> Aplicações críticas onde o tempo é um fator crucial (ex: o controle de rotores em um drone). Esses processos possuem <text:span text:style-name="T26">prioridade absoluta </text:span>sobre os interativos e batch. </text:p>
      <text:h text:style-name="P12" text:outline-level="3" loext:marker-style-name="T20">Estados dos Processos</text:h>
      <text:p text:style-name="P8"><text:span text:style-name="T23">P</text:span>ara garantir o gerenciamento justo dos recursos do sistema, o Linux monitora constantemente o estado de cada processo. Os estados fundamentais são: </text:p>
      <text:p text:style-name="P9"><text:span text:style-name="T25">P</text:span><text:span text:style-name="T24">ronto</text:span> </text:p>
      <text:p text:style-name="P9"><text:span text:style-name="T25">E</text:span><text:span text:style-name="T24">xecutando</text:span> </text:p>
      <text:p text:style-name="P9"><text:soft-page-break/><text:span text:style-name="T25">E</text:span><text:span text:style-name="T24">spera (Bloqueado)</text:span> </text:p>
      <text:p text:style-name="P9"><text:span text:style-name="T25">S</text:span><text:span text:style-name="T24">uspenso</text:span> (que funciona como um subestado do estado de espera) </text:p>
      <text:p text:style-name="P8"><text:span text:style-name="T23">E</text:span>m relação ao perfil de consumo de recursos, os processos também se dividem entre <text:span text:style-name="T31">CPU-bound</text:span> (focados em processamento puro) e<text:span text:style-name="T26"> I/O-bound </text:span>(focados em operações de entrada e saída). </text:p>
      <text:h text:style-name="P7" text:outline-level="3">Prioridades e Escalonamento</text:h>
      <text:p text:style-name="P8"><text:span text:style-name="T23">O</text:span> sistema de prioridades do Linux opera sob uma lógica inversamente proporcional em uma faixa de <text:span text:style-name="T31">40 valores possíveis </text:span>(de -20 a 19): </text:p>
      <text:p text:style-name="P20" loext:marker-style-name="T20"/>
      <text:p text:style-name="P16" loext:marker-style-name="T20"><text:span text:style-name="Strong_20_Emphasis"><text:span text:style-name="T8"/></text:span></text:p>
      <text:p text:style-name="P17" loext:marker-style-name="T20"><text:span text:style-name="Strong_20_Emphasis"><text:span text:style-name="T14">Exercício A: Abra o firefox, um editor de texto e vários outros programas e depois execute o comando top. Veja como as trocas entre processos são muito dinâmicas. Agora, responda em detalhes: O que o cabeçalho do comando mostra e o que cada coluna do comando significa? Para cancelar o comando utilize a combinação de teclas CTRL + C. Lembrando que: CTRL + C → encerra o processo em execução. CTRL + Z → suspende um processo.</text:span></text:span></text:p>
      <text:p text:style-name="P17" loext:marker-style-name="T20"><text:span text:style-name="Strong_20_Emphasis"><text:span text:style-name="T14"/></text:span></text:p>
      <text:p text:style-name="P17" loext:marker-style-name="T20"><text:span text:style-name="Strong_20_Emphasis"><text:span text:style-name="T14">Resposta: </text:span></text:span></text:p>
      <text:p text:style-name="P18" loext:marker-style-name="T20"><text:span text:style-name="Strong_20_Emphasis"><text:span text:style-name="T15">1- </text:span></text:span><text:span text:style-name="Strong_20_Emphasis"><text:span text:style-name="T13">Abaixo do cabeçalho, os processos são listados em colunas. As mais importantes são:</text:span></text:span></text:p>
      <text:list text:style-name="L1">
        <text:list-item>
          <text:p text:style-name="P21"><text:span text:style-name="Strong_20_Emphasis"><text:span text:style-name="T21">PID:</text:span></text:span><text:span text:style-name="T22"> Identificador único do processo (Process ID).</text:span></text:p>
        </text:list-item>
        <text:list-item>
          <text:p text:style-name="P21"><text:span text:style-name="Strong_20_Emphasis"><text:span text:style-name="T21">USER:</text:span></text:span><text:span text:style-name="T22"> Nome do usuário que iniciou o processo.</text:span></text:p>
        </text:list-item>
        <text:list-item>
          <text:p text:style-name="P21"><text:span text:style-name="Strong_20_Emphasis"><text:span text:style-name="T21">PR:</text:span></text:span><text:span text:style-name="T22"> Prioridade de agendamento do processo para o kernel.</text:span></text:p>
        </text:list-item>
        <text:list-item>
          <text:p text:style-name="P21"><text:span text:style-name="Strong_20_Emphasis"><text:span text:style-name="T21">NI:</text:span></text:span><text:span text:style-name="T22"> Valor "nice" (ajuste de prioridade; valores menores dão mais prioridade).</text:span></text:p>
        </text:list-item>
        <text:list-item>
          <text:p text:style-name="P21"><text:span text:style-name="Strong_20_Emphasis"><text:span text:style-name="T21">VIRT:</text:span></text:span><text:span text:style-name="T22"> Quantidade total de memória virtual usada pelo processo.</text:span></text:p>
        </text:list-item>
        <text:list-item>
          <text:p text:style-name="P21"><text:span text:style-name="Strong_20_Emphasis"><text:span text:style-name="T21">RES:</text:span></text:span><text:span text:style-name="T22"> Memória física não trocada (RAM real) que o processo está usando.</text:span></text:p>
        </text:list-item>
        <text:list-item>
          <text:p text:style-name="P21"><text:span text:style-name="Strong_20_Emphasis"><text:span text:style-name="T21">SHR:</text:span></text:span><text:span text:style-name="T22"> Quantidade de memória compartilhada com outros processos.</text:span></text:p>
        </text:list-item>
        <text:list-item>
          <text:p text:style-name="P21"><text:span text:style-name="Strong_20_Emphasis"><text:span text:style-name="T21">S:</text:span></text:span><text:span text:style-name="T22"> Status do processo (</text:span><text:span text:style-name="Strong_20_Emphasis"><text:span text:style-name="T21">S</text:span></text:span><text:span text:style-name="T22">=sleeping, </text:span><text:span text:style-name="Strong_20_Emphasis"><text:span text:style-name="T21">R</text:span></text:span><text:span text:style-name="T22">=running, </text:span><text:span text:style-name="Strong_20_Emphasis"><text:span text:style-name="T21">Z</text:span></text:span><text:span text:style-name="T22">=zombie).</text:span></text:p>
        </text:list-item>
        <text:list-item>
          <text:p text:style-name="P21"><text:span text:style-name="Strong_20_Emphasis"><text:span text:style-name="T21">%CPU:</text:span></text:span><text:span text:style-name="T22"> Percentual de tempo de CPU usado desde a última atualização.</text:span></text:p>
        </text:list-item>
        <text:list-item>
          <text:p text:style-name="P21"><text:span text:style-name="Strong_20_Emphasis"><text:span text:style-name="T21">%MEM:</text:span></text:span><text:span text:style-name="T22"> Percentual de memória física (RAM) utilizada.</text:span></text:p>
        </text:list-item>
        <text:list-item>
          <text:p text:style-name="P21"><text:span text:style-name="Strong_20_Emphasis"><text:span text:style-name="T21">TIME+:</text:span></text:span><text:span text:style-name="T22"> Tempo total de CPU que o processo consumiu desde que foi iniciado.</text:span></text:p>
        </text:list-item>
        <text:list-item>
          <text:p text:style-name="P21"><text:span text:style-name="Strong_20_Emphasis"><text:span text:style-name="T21">COMMAND:</text:span></text:span><text:span text:style-name="T22"> Nome do programa ou comando que iniciou o processo.</text:span></text:p>
        </text:list-item>
      </text:list>
      <text:p text:style-name="P18" loext:marker-style-name="T20"><text:span text:style-name="Strong_20_Emphasis"><text:span text:style-name="T15"/></text:span></text:p>
      <text:p text:style-name="P17" loext:marker-style-name="T20"><text:span text:style-name="Strong_20_Emphasis"><text:span text:style-name="T14"/></text:span></text:p>
      <text:p text:style-name="P18" loext:marker-style-name="T20"><draw:frame draw:style-name="fr4" draw:name="Image1" text:anchor-type="char" svg:width="12.7cm" svg:height="7.144cm" draw:z-index="0"><draw:image xlink:href="Pictures/10000001000001E00000010EC92C3D7D.png" xlink:type="simple" xlink:show="embed" xlink:actuate="onLoad" draw:mime-type="image/png"/></draw:frame><text:soft-page-break/><text:span text:style-name="Strong_20_Emphasis"><text:span text:style-name="T15"/></text:span></text:p>
      <text:p text:style-name="P18" loext:marker-style-name="T20"><draw:frame draw:style-name="fr3" draw:name="Image2" text:anchor-type="char" svg:width="12.647cm" svg:height="5.159cm" draw:z-index="1"><draw:image xlink:href="Pictures/10000001000001DE000000C31F762341.png" xlink:type="simple" xlink:show="embed" xlink:actuate="onLoad" draw:mime-type="image/png"/></draw:frame><text:span text:style-name="Strong_20_Emphasis"><text:span text:style-name="T15"/></text:span></text:p>
      <text:p text:style-name="P18" loext:marker-style-name="T20"><draw:frame draw:style-name="fr1" draw:name="Image3" text:anchor-type="char" svg:width="16cm" svg:height="7.846cm" draw:z-index="2"><draw:image xlink:href="Pictures/100000010000031100000181C59131B7.png" xlink:type="simple" xlink:show="embed" xlink:actuate="onLoad" draw:mime-type="image/png"/></draw:frame><text:span text:style-name="Strong_20_Emphasis"><text:span text:style-name="T15"/></text:span></text:p>
      <text:p text:style-name="P18" loext:marker-style-name="T20"><text:span text:style-name="Strong_20_Emphasis"><text:span text:style-name="T15">2- </text:span></text:span><text:span text:style-name="Strong_20_Emphasis"><text:span text:style-name="T11">O</text:span></text:span><text:span text:style-name="Strong_20_Emphasis"><text:span text:style-name="T10"> comando </text:span></text:span><text:span text:style-name="Strong_20_Emphasis"><text:span text:style-name="Source_20_Text"><text:span text:style-name="T18">top</text:span></text:span></text:span><text:span text:style-name="Strong_20_Emphasis"><text:span text:style-name="T10"> abre um monitor dinâmico em tempo real que exibe o consumo global de recursos do sistema (como CPU e memória) no cabeçalho e detalha os dados específicos de cada processo ativo nas colunas abaixo, permitindo observar a volatilidade das trocas de tarefas. O atalho </text:span></text:span><text:span text:style-name="Strong_20_Emphasis"><text:span text:style-name="Source_20_Text"><text:span text:style-name="T18">CTRL + C</text:span></text:span></text:span><text:span text:style-name="Strong_20_Emphasis"><text:span text:style-name="T10"> encerra o monitor e o </text:span></text:span><text:span text:style-name="Strong_20_Emphasis"><text:span text:style-name="Source_20_Text"><text:span text:style-name="T18">CTRL + Z</text:span></text:span></text:span><text:span text:style-name="Strong_20_Emphasis"><text:span text:style-name="T10"> o suspende.</text:span></text:span></text:p>
      <text:p text:style-name="P18" loext:marker-style-name="T20"><text:span text:style-name="Strong_20_Emphasis"><text:span text:style-name="T15"/></text:span></text:p>
      <text:p text:style-name="P17" loext:marker-style-name="T20"><text:soft-page-break/><text:span text:style-name="Strong_20_Emphasis"><text:span text:style-name="T14">Exercício B: Crie dois novos usuários pedro e madalena. Depois, alterne para o usuário pedro e digite o comando top no terminal dele. Novamente, alterne para o usuário madalena e digite top no terminal dele. Por fim, alterne para o seu usuário e digite top no seu terminal. Perceba as atividades em tempo real dos diferentes usuários do SO Linux e seus processos. Faça um print de tela salvando-o. Você pode fazer isso alternando o usuário utilizando a parte gráfica do Sistema Operacional.</text:span></text:span></text:p>
      <text:p text:style-name="P17" loext:marker-style-name="T20"><text:span text:style-name="Strong_20_Emphasis"><text:span text:style-name="T14"/></text:span></text:p>
      <text:p text:style-name="P19" loext:marker-style-name="T20"><text:span text:style-name="Strong_20_Emphasis"><text:span text:style-name="T16">1- </text:span></text:span><text:span text:style-name="Strong_20_Emphasis"><text:span text:style-name="T11">Ao abrir o </text:span></text:span><text:span text:style-name="Strong_20_Emphasis"><text:span text:style-name="Source_20_Text"><text:span text:style-name="T19">top</text:span></text:span></text:span><text:span text:style-name="Strong_20_Emphasis"><text:span text:style-name="T11"> nos terminais de diferentes usuários compreende-se na prática o conceito de sistema multiusuário do Linux, visualizando como o sistema operacional gerencia e isola as atividades e os processos de cada usuário simultaneamente.</text:span></text:span></text:p>
      <text:p text:style-name="P17" loext:marker-style-name="T20"><text:span text:style-name="Strong_20_Emphasis"><text:span text:style-name="T12"/></text:span></text:p>
      <text:p text:style-name="P17" loext:marker-style-name="T20"><text:span text:style-name="Strong_20_Emphasis"><text:span text:style-name="T14">Resposta: </text:span></text:span></text:p>
      <text:p text:style-name="P17" loext:marker-style-name="T20"><text:span text:style-name="Strong_20_Emphasis"><text:span text:style-name="T14"/></text:span></text:p>
      <text:p text:style-name="P17" loext:marker-style-name="T20"><draw:frame draw:style-name="fr3" draw:name="Image4" text:anchor-type="char" svg:width="12.7cm" svg:height="7.144cm" draw:z-index="3"><draw:image xlink:href="Pictures/10000001000001E00000010E7D4B9F86.png" xlink:type="simple" xlink:show="embed" xlink:actuate="onLoad" draw:mime-type="image/png"/></draw:frame><text:span text:style-name="Strong_20_Emphasis"><text:span text:style-name="T14"/></text:span></text:p>
      <text:p text:style-name="P17" loext:marker-style-name="T20"><draw:frame draw:style-name="fr2" draw:name="Image5" text:anchor-type="char" svg:width="16cm" svg:height="7.535cm" draw:z-index="4"><draw:image xlink:href="Pictures/100000010000031A00000176B7F783F3.png" xlink:type="simple" xlink:show="embed" xlink:actuate="onLoad" draw:mime-type="image/png"/></draw:frame><text:span text:style-name="Strong_20_Emphasis"><text:span text:style-name="T14"/></text:span></text:p>
      <text:p text:style-name="P17" loext:marker-style-name="T20"><draw:frame draw:style-name="fr1" draw:name="Image6" text:anchor-type="char" svg:width="16cm" svg:height="9.611cm" draw:z-index="5"><draw:image xlink:href="Pictures/100000010000031F000001E084D603A9.png" xlink:type="simple" xlink:show="embed" xlink:actuate="onLoad" draw:mime-type="image/png"/></draw:frame><text:soft-page-break/><text:span text:style-name="Strong_20_Emphasis"><text:span text:style-name="T14"/></text:span></text:p>
      <text:p text:style-name="P17" loext:marker-style-name="T20"><text:span text:style-name="Strong_20_Emphasis"><text:span text:style-name="T14"/></text:span></text:p>
      <text:p text:style-name="P17" loext:marker-style-name="T20"><text:span text:style-name="Strong_20_Emphasis"><text:span text:style-name="T14">Exercício C: Teste todas as opções do comando ps e também ps –aux, ps -u </text:span></text:span></text:p>
      <text:p text:style-name="P17" loext:marker-style-name="T20"><text:span text:style-name="Strong_20_Emphasis"><text:span text:style-name="T14"/></text:span></text:p>
      <text:p text:style-name="P19" loext:marker-style-name="T20"><text:span text:style-name="Strong_20_Emphasis"><text:span text:style-name="T16">1- </text:span></text:span><text:span text:style-name="Strong_20_Emphasis"><text:span text:style-name="T11">O comando </text:span></text:span><text:span text:style-name="Strong_20_Emphasis"><text:span text:style-name="Source_20_Text"><text:span text:style-name="T19">ps</text:span></text:span></text:span><text:span text:style-name="Strong_20_Emphasis"><text:span text:style-name="T11"> tira uma foto estática do momento atual do sistema. O parâmetro </text:span></text:span><text:span text:style-name="Strong_20_Emphasis"><text:span text:style-name="Source_20_Text"><text:span text:style-name="T19">ps aux</text:span></text:span></text:span><text:span text:style-name="Strong_20_Emphasis"><text:span text:style-name="T11"> mostra detalhadamente todos os processos de todos os usuários (mesmo sem terminal associado), enquanto </text:span></text:span><text:span text:style-name="Strong_20_Emphasis"><text:span text:style-name="Source_20_Text"><text:span text:style-name="T19">ps -u &lt;seu_usuario&gt;</text:span></text:span></text:span><text:span text:style-name="Strong_20_Emphasis"><text:span text:style-name="T11"> filtra a lista para exibir estritamente as tarefas que pertencem ao seu próprio usuário.</text:span></text:span></text:p>
      <text:p text:style-name="P17" loext:marker-style-name="T20"><text:span text:style-name="Strong_20_Emphasis"><text:span text:style-name="T12"/></text:span></text:p>
      <text:p text:style-name="P17" loext:marker-style-name="T20"><text:span text:style-name="Strong_20_Emphasis"><text:span text:style-name="T14">Resposta: </text:span></text:span></text:p>
      <text:p text:style-name="P17" loext:marker-style-name="T20"><draw:frame draw:style-name="fr2" draw:name="Image7" text:anchor-type="char" svg:width="16cm" svg:height="2.378cm" draw:z-index="6"><draw:image xlink:href="Pictures/10000001000002FF00000072268EF9DD.png" xlink:type="simple" xlink:show="embed" xlink:actuate="onLoad" draw:mime-type="image/png"/></draw:frame><draw:frame draw:style-name="fr2" draw:name="Image8" text:anchor-type="char" svg:width="16cm" svg:height="10.07cm" draw:z-index="7"><draw:image xlink:href="Pictures/100000010000034A000002123D980612.png" xlink:type="simple" xlink:show="embed" xlink:actuate="onLoad" draw:mime-type="image/png"/></draw:frame><text:span text:style-name="Strong_20_Emphasis"><text:span text:style-name="T14"/></text:span></text:p>
      <text:p text:style-name="P17" loext:marker-style-name="T20"><text:soft-page-break/><text:span text:style-name="Strong_20_Emphasis"><text:span text:style-name="T14"/></text:span></text:p>
      <text:p text:style-name="P17" loext:marker-style-name="T20"><text:span text:style-name="Strong_20_Emphasis"><text:span text:style-name="T14"/></text:span></text:p>
      <text:p text:style-name="P17" loext:marker-style-name="T20"><draw:frame draw:style-name="fr2" draw:name="Image9" text:anchor-type="paragraph" svg:width="16cm" svg:height="3.424cm" draw:z-index="8"><draw:image xlink:href="Pictures/1000000100000349000000B456126BCF.png" xlink:type="simple" xlink:show="embed" xlink:actuate="onLoad" draw:mime-type="image/png"/></draw:frame><text:span text:style-name="Strong_20_Emphasis"><text:span text:style-name="T14">Exercício D: No terminal do Linux digite man ps. Agora veja que aparecem várias opções de uso do comando. Em especial teste os comandos abaixo e explique a saída deles. $ ps aux $ ps axjf $ ps -U root -u root u $ ps -ao pid,user,cmd</text:span></text:span></text:p>
      <text:p text:style-name="P17" loext:marker-style-name="T20"><text:span text:style-name="Strong_20_Emphasis"><text:span text:style-name="T14"/></text:span></text:p>
      <text:p text:style-name="P19" loext:marker-style-name="T20"><text:span text:style-name="Strong_20_Emphasis"><text:span text:style-name="T16">1- </text:span></text:span><text:span text:style-name="Strong_20_Emphasis"><text:span text:style-name="T11">O comando </text:span></text:span><text:span text:style-name="Strong_20_Emphasis"><text:span text:style-name="Source_20_Text"><text:span text:style-name="T19">ps</text:span></text:span></text:span><text:span text:style-name="Strong_20_Emphasis"><text:span text:style-name="T11"> (Process Status) funciona como uma fotografia instantânea dos processos em execução no sistema operacional Linux, oferecendo diferentes perspectivas dependendo das opções aplicadas. Quando executamos o comando </text:span></text:span><text:span text:style-name="Strong_20_Emphasis"><text:span text:style-name="Source_20_Text"><text:span text:style-name="T19">ps aux</text:span></text:span></text:span><text:span text:style-name="Strong_20_Emphasis"><text:span text:style-name="T11">, obtemos uma listagem geral e detalhada que engloba os processos de todos os usuários do sistema, estejam eles atrelados a um terminal ou rodando silenciosamente em segundo plano, exibindo métricas cruciais como o consumo de memória, uso de processamento e a identidade do usuário proprietário. Se o objetivo for compreender a árvore genealógica do sistema, o comando </text:span></text:span><text:span text:style-name="Strong_20_Emphasis"><text:span text:style-name="Source_20_Text"><text:span text:style-name="T19">ps axjf</text:span></text:span></text:span><text:span text:style-name="Strong_20_Emphasis"><text:span text:style-name="T11"> reorganiza essa mesma lista global de tarefas de forma hierárquica, utilizando recuos visuais para conectar graficamente cada processo filho ao seu respectivo processo pai. Para cenários de auditoria ou monitoramento administrativo, a sintaxe </text:span></text:span><text:span text:style-name="Strong_20_Emphasis"><text:span text:style-name="Source_20_Text"><text:span text:style-name="T19">ps -U root -u root u</text:span></text:span></text:span><text:span text:style-name="Strong_20_Emphasis"><text:span text:style-name="T11"> atua como um filtro restritivo, isolando e detalhando unicamente as atividades do superusuário root para identificar serviços do sistema e comandos disparados com privilégios elevados. Por fim, o utilitário permite total customização visual através do comando </text:span></text:span><text:span text:style-name="Strong_20_Emphasis"><text:span text:style-name="Source_20_Text"><text:span text:style-name="T19">ps -ao pid,user,cmd</text:span></text:span></text:span><text:span text:style-name="Strong_20_Emphasis"><text:span text:style-name="T11">, no qual o usuário dita explicitamente a estrutura da tabela final, limpando o excesso de dados para exibir uma saída simplificada composta apenas pelas colunas de identificação do processo, nome do usuário responsável e o comando executado.</text:span></text:span></text:p>
      <text:p text:style-name="P19" loext:marker-style-name="T20"><text:span text:style-name="Strong_20_Emphasis"><text:span text:style-name="T16"/></text:span></text:p>
      <text:p text:style-name="P19" loext:marker-style-name="T20"><text:soft-page-break/><text:span text:style-name="Strong_20_Emphasis"><text:span text:style-name="T16">2- </text:span></text:span><text:span text:style-name="Strong_20_Emphasis"><text:span text:style-name="T11">O comando </text:span></text:span><text:span text:style-name="Strong_20_Emphasis"><text:span text:style-name="Source_20_Text"><text:span text:style-name="T19">ps axjf</text:span></text:span></text:span><text:span text:style-name="Strong_20_Emphasis"><text:span text:style-name="T11"> exibe a hierarquia dos processos em formato de árvore para evidenciar as relações de parentesco, e o comando </text:span></text:span><text:span text:style-name="Strong_20_Emphasis"><text:span text:style-name="Source_20_Text"><text:span text:style-name="T19">ps ao pid, user, cmd</text:span></text:span></text:span><text:span text:style-name="Strong_20_Emphasis"><text:span text:style-name="T11"> personaliza a visualização para exibir apenas as colunas de identificação, usuário e comando.</text:span></text:span></text:p>
      <text:p text:style-name="P17" loext:marker-style-name="T20"><text:span text:style-name="Strong_20_Emphasis"><text:span text:style-name="T14"/></text:span></text:p>
      <text:p text:style-name="P17" loext:marker-style-name="T20"><text:span text:style-name="Strong_20_Emphasis"><text:span text:style-name="T14">Resposta: </text:span></text:span></text:p>
      <text:p text:style-name="P17" loext:marker-style-name="T20"><draw:frame draw:style-name="fr1" draw:name="Image10" text:anchor-type="char" svg:width="16cm" svg:height="10.153cm" draw:z-index="9"><draw:image xlink:href="Pictures/100000010000034000000210D6EDAA3A.png" xlink:type="simple" xlink:show="embed" xlink:actuate="onLoad" draw:mime-type="image/png"/></draw:frame><text:span text:style-name="Strong_20_Emphasis"><text:span text:style-name="T14"/></text:span></text:p>
      <text:p text:style-name="P17" loext:marker-style-name="T20"><text:span text:style-name="Strong_20_Emphasis"><text:span text:style-name="T14"/></text:span></text:p>
      <text:p text:style-name="P17" loext:marker-style-name="T20"><text:span text:style-name="Strong_20_Emphasis"><text:span text:style-name="T14">Exercício E: Abra o firefox, um editor de texto (pico &amp;) e vários outros programas (p.e., gedit) e depois execute o comando pidof. Verifique se o comando faz o que se propõe. $ pidof mysqld $ pidof pico $ pidof firefox $ pidof gedit Responda: Qual o retorno de cada um dos comandos acima? </text:span></text:span></text:p>
      <text:p text:style-name="P17" loext:marker-style-name="T20"><text:span text:style-name="Strong_20_Emphasis"><text:span text:style-name="T14"/></text:span></text:p>
      <text:p text:style-name="P19" loext:marker-style-name="T20"><text:span text:style-name="Strong_20_Emphasis"><text:span text:style-name="T16">1-</text:span></text:span><text:span text:style-name="Strong_20_Emphasis"><text:span text:style-name="T11"> O comando </text:span></text:span><text:span text:style-name="Strong_20_Emphasis"><text:span text:style-name="Source_20_Text"><text:span text:style-name="T19">pidof</text:span></text:span></text:span><text:span text:style-name="Strong_20_Emphasis"><text:span text:style-name="T11"> localiza o número de identificação (PID) de programas em execução pelo nome. O retorno de </text:span></text:span><text:span text:style-name="Strong_20_Emphasis"><text:span text:style-name="Source_20_Text"><text:span text:style-name="T19">pidof mysqld</text:span></text:span></text:span><text:span text:style-name="Strong_20_Emphasis"><text:span text:style-name="T11"> será vazio porque o banco de dados MySQL não está rodando. O comando </text:span></text:span><text:span text:style-name="Strong_20_Emphasis"><text:span text:style-name="Source_20_Text"><text:span text:style-name="T19">pidof pico</text:span></text:span></text:span><text:span text:style-name="Strong_20_Emphasis"><text:span text:style-name="T11"> também ficará vazio ou mostrará o PID do </text:span></text:span><text:span text:style-name="Strong_20_Emphasis"><text:span text:style-name="Source_20_Text"><text:span text:style-name="T19">nano</text:span></text:span></text:span><text:span text:style-name="Strong_20_Emphasis"><text:span text:style-name="T11">, já que o Linux moderno costuma substituir o antigo editor Pico pelo Nano. Para </text:span></text:span><text:span text:style-name="Strong_20_Emphasis"><text:span text:style-name="Source_20_Text"><text:span text:style-name="T19">pidof firefox</text:span></text:span></text:span><text:span text:style-name="Strong_20_Emphasis"><text:span text:style-name="T11">, o retorno será uma lista com vários números, pois o navegador moderno abre múltiplos processos independentes para abas e extensões. Já </text:span></text:span><text:span text:style-name="Strong_20_Emphasis"><text:span text:style-name="Source_20_Text"><text:span text:style-name="T19">pidof gedit</text:span></text:span></text:span><text:span text:style-name="Strong_20_Emphasis"><text:span text:style-name="T11"> devolverá um único número, correspondente ao processo único do editor de texto aberto. O comando cumpre perfeitamente o que se propõe, sendo ideal para rastrear e gerenciar tarefas ativas.</text:span></text:span></text:p>
      <text:p text:style-name="P19" loext:marker-style-name="T20"><text:span text:style-name="Strong_20_Emphasis"><text:span text:style-name="T16"/></text:span></text:p>
      <text:p text:style-name="P19" loext:marker-style-name="T20"><text:span text:style-name="Strong_20_Emphasis"><text:span text:style-name="T16">2- </text:span></text:span><text:span text:style-name="Strong_20_Emphasis"><text:span text:style-name="T11">O comando </text:span></text:span><text:span text:style-name="Strong_20_Emphasis"><text:span text:style-name="Source_20_Text"><text:span text:style-name="T19">pidof</text:span></text:span></text:span><text:span text:style-name="Strong_20_Emphasis"><text:span text:style-name="T11"> serve para mapear e descobrir o número de identificação único (PID) de um programa a partir do seu nome. O sistema retorna o número correspondente para programas abertos (como </text:span></text:span><text:span text:style-name="Strong_20_Emphasis"><text:span text:style-name="Source_20_Text"><text:span text:style-name="T19">firefox</text:span></text:span></text:span><text:span text:style-name="Strong_20_Emphasis"><text:span text:style-name="T11"> e </text:span></text:span><text:span text:style-name="Strong_20_Emphasis"><text:span text:style-name="Source_20_Text"><text:span text:style-name="T19">gedit</text:span></text:span></text:span><text:span text:style-name="Strong_20_Emphasis"><text:span text:style-name="T11">), mas não gera nenhum retorno se o programa estiver fechado (como pode ocorrer com o </text:span></text:span><text:span text:style-name="Strong_20_Emphasis"><text:span text:style-name="Source_20_Text"><text:span text:style-name="T19">mysqld</text:span></text:span></text:span><text:span text:style-name="Strong_20_Emphasis"><text:span text:style-name="T11">).</text:span></text:span></text:p>
      <text:p text:style-name="P17" loext:marker-style-name="T20"><text:span text:style-name="Strong_20_Emphasis"><text:span text:style-name="T14"/></text:span></text:p>
      <text:p text:style-name="P17" loext:marker-style-name="T20"><text:span text:style-name="Strong_20_Emphasis"><text:span text:style-name="T14">Resposta: </text:span></text:span></text:p>
      <text:p text:style-name="P17" loext:marker-style-name="T20"><draw:frame draw:style-name="fr1" draw:name="Image11" text:anchor-type="char" svg:width="16cm" svg:height="10.153cm" draw:z-index="10"><draw:image xlink:href="Pictures/100000010000034000000210CA0492BD.png" xlink:type="simple" xlink:show="embed" xlink:actuate="onLoad" draw:mime-type="image/png"/></draw:frame><text:soft-page-break/><text:span text:style-name="Strong_20_Emphasis"><text:span text:style-name="T14"/></text:span></text:p>
      <text:p text:style-name="P17" loext:marker-style-name="T20"><text:span text:style-name="Strong_20_Emphasis"><text:span text:style-name="T14"/></text:span></text:p>
      <text:p text:style-name="P17" loext:marker-style-name="T20"><text:span text:style-name="Strong_20_Emphasis"><text:span text:style-name="T14">Exercício F: Execute os comandos acima, anote o que acontece e tire um print de tela salvando-o. Depois, coloque em execução pelo menos 2 programas (processos). Por exemplo: $ firefox &amp; $ pico &amp; Pare o firefox usando kill –STOP </text:span></text:span></text:p>
      <text:p text:style-name="P17" loext:marker-style-name="T20"><text:span text:style-name="Strong_20_Emphasis"><text:span text:style-name="T14"/></text:span></text:p>
      <text:p text:style-name="P19" loext:marker-style-name="T20"><text:span text:style-name="Strong_20_Emphasis"><text:span text:style-name="T16">1- </text:span></text:span><text:span text:style-name="Strong_20_Emphasis"><text:span text:style-name="T11">O comando </text:span></text:span><text:span text:style-name="Strong_20_Emphasis"><text:span text:style-name="Source_20_Text"><text:span text:style-name="T19">kill</text:span></text:span></text:span><text:span text:style-name="Strong_20_Emphasis"><text:span text:style-name="T11"> envia sinais de controle: o sinal </text:span></text:span><text:span text:style-name="Strong_20_Emphasis"><text:span text:style-name="Source_20_Text"><text:span text:style-name="T19">-STOP</text:span></text:span></text:span><text:span text:style-name="Strong_20_Emphasis"><text:span text:style-name="T11"> congela o processo do </text:span></text:span><text:span text:style-name="Strong_20_Emphasis"><text:span text:style-name="Source_20_Text"><text:span text:style-name="T19">firefox</text:span></text:span></text:span><text:span text:style-name="Strong_20_Emphasis"><text:span text:style-name="T11"> ou </text:span></text:span><text:span text:style-name="Strong_20_Emphasis"><text:span text:style-name="Source_20_Text"><text:span text:style-name="T19">gedit</text:span></text:span></text:span><text:span text:style-name="Strong_20_Emphasis"><text:span text:style-name="T11">, impedindo qualquer ação do usuário no programa; o sinal </text:span></text:span><text:span text:style-name="Strong_20_Emphasis"><text:span text:style-name="Source_20_Text"><text:span text:style-name="T19">-CONT</text:span></text:span></text:span><text:span text:style-name="Strong_20_Emphasis"><text:span text:style-name="T11"> reativa a aplicação de onde ela parou; e o sinal </text:span></text:span><text:span text:style-name="Strong_20_Emphasis"><text:span text:style-name="Source_20_Text"><text:span text:style-name="T19">-9</text:span></text:span></text:span><text:span text:style-name="Strong_20_Emphasis"><text:span text:style-name="T11"> força a interrupção definitiva, fechando os programas imediatamente.</text:span></text:span></text:p>
      <text:p text:style-name="P17" loext:marker-style-name="T20"><text:span text:style-name="Strong_20_Emphasis"><text:span text:style-name="T12"/></text:span></text:p>
      <text:p text:style-name="P17" loext:marker-style-name="T20"><text:span text:style-name="Strong_20_Emphasis"><text:span text:style-name="T14">Resposta: </text:span></text:span></text:p>
      <text:p text:style-name="P17" loext:marker-style-name="T20"><draw:frame draw:style-name="fr2" draw:name="Image12" text:anchor-type="char" svg:width="16cm" svg:height="10.153cm" draw:z-index="11"><draw:image xlink:href="Pictures/10000001000003400000021003E289A5.png" xlink:type="simple" xlink:show="embed" xlink:actuate="onLoad" draw:mime-type="image/png"/></draw:frame><text:soft-page-break/><text:span text:style-name="Strong_20_Emphasis"><text:span text:style-name="T14"/></text:span></text:p>
      <text:p text:style-name="P17" loext:marker-style-name="T20"><draw:frame draw:style-name="fr2" draw:name="Image13" text:anchor-type="char" svg:width="16cm" svg:height="10.153cm" draw:z-index="12"><draw:image xlink:href="Pictures/100000010000034000000210C0C746C9.png" xlink:type="simple" xlink:show="embed" xlink:actuate="onLoad" draw:mime-type="image/png"/></draw:frame><text:span text:style-name="Strong_20_Emphasis"><text:span text:style-name="T14"/></text:span></text:p>
      <text:p text:style-name="P17" loext:marker-style-name="T20"><text:span text:style-name="Strong_20_Emphasis"><text:span text:style-name="T14"/></text:span></text:p>
      <text:p text:style-name="P17" loext:marker-style-name="T20"><text:span text:style-name="Strong_20_Emphasis"><text:span text:style-name="T14">Exercício G: Execute os comandos abaixo, anote o que acontece e tire um print de tela salvando-o;</text:span></text:span></text:p>
      <text:p text:style-name="P17" loext:marker-style-name="T20"><text:span text:style-name="Strong_20_Emphasis"><text:span text:style-name="T14">$ firefox &amp; $ mcopy resposta.txt resposta2.txt &amp; $ ls *.txt …. $ gedit (aqui o gedit executa em foreground, ou seja, em primeiro plano prendendo o terminal) $ ^Z (suspende o processo que está em foreground chamado gedit)</text:span></text:span></text:p>
      <text:p text:style-name="P17" loext:marker-style-name="T20"><text:span text:style-name="Strong_20_Emphasis"><text:span text:style-name="T14"/></text:span></text:p>
      <text:p text:style-name="P19" loext:marker-style-name="T20"><text:soft-page-break/><text:span text:style-name="Strong_20_Emphasis"><text:span text:style-name="T16">1- </text:span></text:span><text:span text:style-name="Strong_20_Emphasis"><text:span text:style-name="T11">A execução de </text:span></text:span><text:span text:style-name="Strong_20_Emphasis"><text:span text:style-name="Source_20_Text"><text:span text:style-name="T19">firefox &amp;</text:span></text:span></text:span><text:span text:style-name="Strong_20_Emphasis"><text:span text:style-name="T11"> inicia o navegador em segundo plano liberando o terminal, enquanto </text:span></text:span><text:span text:style-name="Strong_20_Emphasis"><text:span text:style-name="Source_20_Text"><text:span text:style-name="T19">mcopy resposta.txt resposta2.txt &amp;</text:span></text:span></text:span><text:span text:style-name="Strong_20_Emphasis"><text:span text:style-name="T11"> tenta realizar uma cópia de arquivos estilo DOS também em segundo plano, disparando um erro caso o arquivo ou utilitário não existam. O comando </text:span></text:span><text:span text:style-name="Strong_20_Emphasis"><text:span text:style-name="Source_20_Text"><text:span text:style-name="T19">ls *.txt</text:span></text:span></text:span><text:span text:style-name="Strong_20_Emphasis"><text:span text:style-name="T11"> lista os arquivos de texto do diretório atual, mas gera falha de sintaxe se as reticências forem incluídas. Ao digitar </text:span></text:span><text:span text:style-name="Strong_20_Emphasis"><text:span text:style-name="Source_20_Text"><text:span text:style-name="T19">gedit</text:span></text:span></text:span><text:span text:style-name="Strong_20_Emphasis"><text:span text:style-name="T11">, o editor de texto abre em primeiro plano e trava o terminal para novos comandos até que o atalho </text:span></text:span><text:span text:style-name="Strong_20_Emphasis"><text:span text:style-name="Source_20_Text"><text:span text:style-name="T19">Ctrl + Z</text:span></text:span></text:span><text:span text:style-name="Strong_20_Emphasis"><text:span text:style-name="T11"> (^Z) seja pressionado, o qual envia um sinal para congelar a interface do editor e liberar o prompt com o status de suspenso, deixando o histórico pronto para ser capturado por um print de tela via tecla Print Screen.</text:span></text:span></text:p>
      <text:p text:style-name="P19" loext:marker-style-name="T20"><text:span text:style-name="Strong_20_Emphasis"><text:span text:style-name="T16"/></text:span></text:p>
      <text:p text:style-name="P19" loext:marker-style-name="T20"><text:span text:style-name="Strong_20_Emphasis"><text:span text:style-name="T16">2- </text:span></text:span><text:span text:style-name="Strong_20_Emphasis"><text:span text:style-name="T11">O uso do </text:span></text:span><text:span text:style-name="Strong_20_Emphasis"><text:span text:style-name="Source_20_Text"><text:span text:style-name="T19">&amp;</text:span></text:span></text:span><text:span text:style-name="Strong_20_Emphasis"><text:span text:style-name="T11"> no final de um comando faz o programa rodar ocultamente em segundo plano (</text:span></text:span><text:span text:style-name="Strong_20_Emphasis"><text:span text:style-name="T17">background</text:span></text:span><text:span text:style-name="Strong_20_Emphasis"><text:span text:style-name="T11">), liberando o terminal de imediato para novos comandos. Executar um programa sem o </text:span></text:span><text:span text:style-name="Strong_20_Emphasis"><text:span text:style-name="Source_20_Text"><text:span text:style-name="T19">&amp;</text:span></text:span></text:span><text:span text:style-name="Strong_20_Emphasis"><text:span text:style-name="T11"> o mantém em primeiro plano (</text:span></text:span><text:span text:style-name="Strong_20_Emphasis"><text:span text:style-name="T17">foreground</text:span></text:span><text:span text:style-name="Strong_20_Emphasis"><text:span text:style-name="T11">), travando o terminal até que seja suspenso com </text:span></text:span><text:span text:style-name="Strong_20_Emphasis"><text:span text:style-name="Source_20_Text"><text:span text:style-name="T19">CTRL + Z</text:span></text:span></text:span><text:span text:style-name="Strong_20_Emphasis"><text:span text:style-name="T11">.</text:span></text:span></text:p>
      <text:p text:style-name="P17" loext:marker-style-name="T20"><text:span text:style-name="Strong_20_Emphasis"><text:span text:style-name="T14"/></text:span></text:p>
      <text:p text:style-name="P17" loext:marker-style-name="T20"><text:span text:style-name="Strong_20_Emphasis"><text:span text:style-name="T14">Resposta: </text:span></text:span></text:p>
      <text:p text:style-name="P17" loext:marker-style-name="T20"><draw:frame draw:style-name="fr2" draw:name="Image14" text:anchor-type="char" svg:width="16cm" svg:height="8.199cm" draw:z-index="13"><draw:image xlink:href="Pictures/100000010000034D000001B167A89F3B.png" xlink:type="simple" xlink:show="embed" xlink:actuate="onLoad" draw:mime-type="image/png"/></draw:frame><text:span text:style-name="Strong_20_Emphasis"><text:span text:style-name="T14"/></text:span></text:p>
      <text:p text:style-name="P17" loext:marker-style-name="T20"><draw:frame draw:style-name="fr2" draw:name="Image15" text:anchor-type="char" svg:width="16cm" svg:height="8.199cm" draw:z-index="14"><draw:image xlink:href="Pictures/100000010000034D000001B1F530CE00.png" xlink:type="simple" xlink:show="embed" xlink:actuate="onLoad" draw:mime-type="image/png"/></draw:frame><text:soft-page-break/><text:span text:style-name="Strong_20_Emphasis"><text:span text:style-name="T14"/></text:span></text:p>
      <text:p text:style-name="P17" loext:marker-style-name="T20"><draw:frame draw:style-name="fr2" draw:name="Image16" text:anchor-type="char" svg:width="16cm" svg:height="8.199cm" draw:z-index="15"><draw:image xlink:href="Pictures/100000010000034D000001B1FDA4F5B3.png" xlink:type="simple" xlink:show="embed" xlink:actuate="onLoad" draw:mime-type="image/png"/></draw:frame><text:span text:style-name="Strong_20_Emphasis"><text:span text:style-name="T14"/></text:span></text:p>
      <text:p text:style-name="P17" loext:marker-style-name="T20"><text:span text:style-name="Strong_20_Emphasis"><text:span text:style-name="T14"/></text:span></text:p>
      <text:p text:style-name="P17" loext:marker-style-name="T20"><text:span text:style-name="Strong_20_Emphasis"><text:span text:style-name="T14">Exercício H: Quais processos estão suspensos (parados) e em background em seu SO? Anote e faça um print de tela salvando-o.</text:span></text:span></text:p>
      <text:p text:style-name="P17" loext:marker-style-name="T20"><text:span text:style-name="Strong_20_Emphasis"><text:span text:style-name="T14"/></text:span></text:p>
      <text:p text:style-name="P19" loext:marker-style-name="T20"><text:span text:style-name="Strong_20_Emphasis"><text:span text:style-name="T16">1- </text:span></text:span><text:span text:style-name="Strong_20_Emphasis"><text:span text:style-name="T11">O comando </text:span></text:span><text:span text:style-name="Strong_20_Emphasis"><text:span text:style-name="Source_20_Text"><text:span text:style-name="T19">jobs</text:span></text:span></text:span><text:span text:style-name="Strong_20_Emphasis"><text:span text:style-name="T11"> é utilizado para listar em texto todas as tarefas ativas que foram iniciadas a partir daquele terminal específico e que se encontram atualmente suspensas ou rodando de forma oculta em segundo plano, exibindo o número de identificação do trabalho entre colchetes.</text:span></text:span></text:p>
      <text:p text:style-name="P17" loext:marker-style-name="T20"><text:span text:style-name="Strong_20_Emphasis"><text:span text:style-name="T14"/></text:span></text:p>
      <text:p text:style-name="P17" loext:marker-style-name="T20"><text:span text:style-name="Strong_20_Emphasis"><text:span text:style-name="T14">Resposta: </text:span></text:span></text:p>
      <text:p text:style-name="P17" loext:marker-style-name="T20"><draw:frame draw:style-name="fr2" draw:name="Image17" text:anchor-type="char" svg:width="16cm" svg:height="2.588cm" draw:z-index="16"><draw:image xlink:href="Pictures/10000001000003360000008569B289D5.png" xlink:type="simple" xlink:show="embed" xlink:actuate="onLoad" draw:mime-type="image/png"/></draw:frame><text:soft-page-break/><text:span text:style-name="Strong_20_Emphasis"><text:span text:style-name="T14"/></text:span></text:p>
      <text:p text:style-name="P17" loext:marker-style-name="T20"><text:span text:style-name="Strong_20_Emphasis"><text:span text:style-name="T14"/></text:span></text:p>
      <text:p text:style-name="P17" loext:marker-style-name="T20"><text:span text:style-name="Strong_20_Emphasis"><text:span text:style-name="T14"/></text:span></text:p>
      <text:p text:style-name="P17" loext:marker-style-name="T20"><text:span text:style-name="Strong_20_Emphasis"><text:span text:style-name="T14">Exercício I: Faça o que se pede e ao final dê um print de tela mostrando o comportamento dos comandos digitados. Inicie dois processos (firefox e gedit) $ firefox $ CTRL + Z (suspende processo) $ gedit $ CTRL + Z (suspende processo) Coloque-os em background $ jobs $ bg %? → (número que aparece entre colchetes antes do nome do processo firefox) $ bg %? → (número que aparece entre colchetes antes do nome do processo gedit) Pare o processo gedit, mas depois faça-o voltar a executar. $ pidof gedit $ kill –STOP pid_de_gedit Tente escrever no arquivo aberto no gedit. Conseguiu? ( ) Sim ( ) Não Agora faça o processo continuar a executar $ kill –CONT pid_de_gedit Mate os processos firefox e gedit utilizando o comando kill -9. Repita os exercícios novamente criando vários processos, parando-os e depois fazendo-os voltar a executar. Use sua criatividade, dê um print de tela salvando-o.</text:span></text:span></text:p>
      <text:p text:style-name="P19" loext:marker-style-name="T20"><text:span text:style-name="Strong_20_Emphasis"><text:span text:style-name="T16"/></text:span></text:p>
      <text:p text:style-name="P19" loext:marker-style-name="T20"><text:span text:style-name="Strong_20_Emphasis"><text:span text:style-name="T16">1- </text:span></text:span><text:span text:style-name="Strong_20_Emphasis"><text:span text:style-name="T11">Sim.</text:span></text:span></text:p>
      <text:p text:style-name="P19" loext:marker-style-name="T20"><text:span text:style-name="Strong_20_Emphasis"><text:span text:style-name="T16"/></text:span></text:p>
      <text:p text:style-name="P19" loext:marker-style-name="T20"><text:span text:style-name="Strong_20_Emphasis"><text:span text:style-name="T16">2-</text:span></text:span><text:span text:style-name="Strong_20_Emphasis"><text:span text:style-name="T11"> O comando </text:span></text:span><text:span text:style-name="Strong_20_Emphasis"><text:span text:style-name="Source_20_Text"><text:span text:style-name="T19">bg %n</text:span></text:span></text:span><text:span text:style-name="Strong_20_Emphasis"><text:span text:style-name="T11"> permite pegar uma tarefa que foi pausada pelo atalho </text:span></text:span><text:span text:style-name="Strong_20_Emphasis"><text:span text:style-name="Source_20_Text"><text:span text:style-name="T19">CTRL + Z</text:span></text:span></text:span><text:span text:style-name="Strong_20_Emphasis"><text:span text:style-name="T11"> e fazê-la retomar a execução ativa diretamente em segundo plano. O exercício também reforça o uso combinado de sinais como </text:span></text:span><text:span text:style-name="Strong_20_Emphasis"><text:span text:style-name="Source_20_Text"><text:span text:style-name="T19">-STOP</text:span></text:span></text:span><text:span text:style-name="Strong_20_Emphasis"><text:span text:style-name="T11"> e </text:span></text:span><text:span text:style-name="Strong_20_Emphasis"><text:span text:style-name="Source_20_Text"><text:span text:style-name="T19">-CONT</text:span></text:span></text:span><text:span text:style-name="Strong_20_Emphasis"><text:span text:style-name="T11"> via PID para congelar e descongelar o editor </text:span></text:span><text:span text:style-name="Strong_20_Emphasis"><text:span text:style-name="Source_20_Text"><text:span text:style-name="T19">gedit</text:span></text:span></text:span><text:span text:style-name="Strong_20_Emphasis"><text:span text:style-name="T11"> em tempo de execução</text:span></text:span></text:p>
      <text:p text:style-name="P17" loext:marker-style-name="T20"><text:span text:style-name="Strong_20_Emphasis"><text:span text:style-name="T14"/></text:span></text:p>
      <text:p text:style-name="P17" loext:marker-style-name="T20"><text:span text:style-name="Strong_20_Emphasis"><text:span text:style-name="T14">Resposta: </text:span></text:span></text:p>
      <text:p text:style-name="P17" loext:marker-style-name="T20"><draw:frame draw:style-name="fr2" draw:name="Image23" text:anchor-type="char" svg:width="16cm" svg:height="5.667cm" draw:z-index="22"><draw:image xlink:href="Pictures/100000010000031C0000011A24CA224F.png" xlink:type="simple" xlink:show="embed" xlink:actuate="onLoad" draw:mime-type="image/png"/></draw:frame><text:span text:style-name="Strong_20_Emphasis"><text:span text:style-name="T14"/></text:span></text:p>
      <text:p text:style-name="P17" loext:marker-style-name="T20"><draw:frame draw:style-name="fr2" draw:name="Image24" text:anchor-type="char" svg:width="16cm" svg:height="4.464cm" draw:z-index="23"><draw:image xlink:href="Pictures/100000010000031F000000DF20151396.png" xlink:type="simple" xlink:show="embed" xlink:actuate="onLoad" draw:mime-type="image/png"/></draw:frame><text:soft-page-break/><text:span text:style-name="Strong_20_Emphasis"><text:span text:style-name="T14"/></text:span></text:p>
      <text:p text:style-name="P17" loext:marker-style-name="T20"><draw:frame draw:style-name="fr2" draw:name="Image25" text:anchor-type="char" svg:width="16cm" svg:height="4.464cm" draw:z-index="24"><draw:image xlink:href="Pictures/100000010000031F000000DF4FC688C3.png" xlink:type="simple" xlink:show="embed" xlink:actuate="onLoad" draw:mime-type="image/png"/></draw:frame><text:span text:style-name="Strong_20_Emphasis"><text:span text:style-name="T14"/></text:span></text:p>
      <text:p text:style-name="P17" loext:marker-style-name="T20"><draw:frame draw:style-name="fr2" draw:name="Image26" text:anchor-type="char" svg:width="16cm" svg:height="6.285cm" draw:z-index="25"><draw:image xlink:href="Pictures/100000010000030B00000132B5DB1CA2.png" xlink:type="simple" xlink:show="embed" xlink:actuate="onLoad" draw:mime-type="image/png"/></draw:frame><text:span text:style-name="Strong_20_Emphasis"><text:span text:style-name="T14"/></text:span></text:p>
      <text:p text:style-name="P17" loext:marker-style-name="T20"><text:span text:style-name="Strong_20_Emphasis"><text:span text:style-name="T14"/></text:span></text:p>
      <text:p text:style-name="P17" loext:marker-style-name="T20"><text:span text:style-name="Strong_20_Emphasis"><text:span text:style-name="T14"/></text:span></text:p>
      <text:p text:style-name="P17" loext:marker-style-name="T20"><text:span text:style-name="Strong_20_Emphasis"><text:span text:style-name="T14">Exercício J: Faça o mesmo exercício com o firefox e dê um print de tela salvando-o.</text:span></text:span></text:p>
      <text:p text:style-name="P17" loext:marker-style-name="T20"><text:span text:style-name="Strong_20_Emphasis"><text:span text:style-name="T14"/></text:span></text:p>
      <text:p text:style-name="P19" loext:marker-style-name="T20"><text:span text:style-name="Strong_20_Emphasis"><text:span text:style-name="T16">1- </text:span></text:span><text:span text:style-name="Strong_20_Emphasis"><text:span text:style-name="T11">O comando </text:span></text:span><text:span text:style-name="Strong_20_Emphasis"><text:span text:style-name="Source_20_Text"><text:span text:style-name="T19">fg %n</text:span></text:span></text:span><text:span text:style-name="Strong_20_Emphasis"><text:span text:style-name="T11"> realiza a ação inversa do </text:span></text:span><text:span text:style-name="Strong_20_Emphasis"><text:span text:style-name="Source_20_Text"><text:span text:style-name="T19">bg</text:span></text:span></text:span><text:span text:style-name="Strong_20_Emphasis"><text:span text:style-name="T11"> ao trazer um processo que estava em segundo plano de volta para o primeiro plano (</text:span></text:span><text:span text:style-name="Strong_20_Emphasis"><text:span text:style-name="T17">foreground</text:span></text:span><text:span text:style-name="Strong_20_Emphasis"><text:span text:style-name="T11">). Ao aplicar o comando no </text:span></text:span><text:span text:style-name="Strong_20_Emphasis"><text:span text:style-name="Source_20_Text"><text:span text:style-name="T19">firefox</text:span></text:span></text:span><text:span text:style-name="Strong_20_Emphasis"><text:span text:style-name="T11">, o navegador captura o foco do terminal novamente, impedindo novas digitações até que o processo seja encerrado ou pausado.</text:span></text:span></text:p>
      <text:p text:style-name="P17" loext:marker-style-name="T20"><text:span text:style-name="Strong_20_Emphasis"><text:span text:style-name="T14"/></text:span></text:p>
      <text:p text:style-name="P17" loext:marker-style-name="T20"><text:span text:style-name="Strong_20_Emphasis"><text:span text:style-name="T14">Resposta: </text:span></text:span></text:p>
      <text:p text:style-name="P17" loext:marker-style-name="T20"><draw:frame draw:style-name="fr1" draw:name="Image27" text:anchor-type="char" svg:width="16cm" svg:height="10.238cm" draw:z-index="26"><draw:image xlink:href="Pictures/100000010000031D000001FE8A0CF95C.png" xlink:type="simple" xlink:show="embed" xlink:actuate="onLoad" draw:mime-type="image/png"/></draw:frame><text:soft-page-break/><text:span text:style-name="Strong_20_Emphasis"><text:span text:style-name="T14"/></text:span></text:p>
      <text:p text:style-name="P17" loext:marker-style-name="T20"><text:span text:style-name="Strong_20_Emphasis"><text:span text:style-name="T14"/></text:span></text:p>
      <text:p text:style-name="P17" loext:marker-style-name="T20"><text:span text:style-name="Strong_20_Emphasis"><text:span text:style-name="T14"/></text:span></text:p>
      <text:p text:style-name="P17" loext:marker-style-name="T20"><text:span text:style-name="Strong_20_Emphasis"><text:span text:style-name="T14">Exercício K Teste os comandos dos exemplos a</text:span></text:span><text:span text:style-name="Strong_20_Emphasis"><text:span text:style-name="T16">baixo</text:span></text:span><text:span text:style-name="Strong_20_Emphasis"><text:span text:style-name="T14"> e faça um print de tela.</text:span></text:span></text:p>
      <text:p text:style-name="P19" loext:marker-style-name="T20"><text:span text:style-name="Strong_20_Emphasis"><text:span text:style-name="T14">$ls | sort –r $ls /usr/local | more $ps -aux | more </text:span></text:span></text:p>
      <text:p text:style-name="P19" loext:marker-style-name="T20"><text:span text:style-name="Strong_20_Emphasis"><text:span text:style-name="T14"/></text:span></text:p>
      <text:p text:style-name="P19" loext:marker-style-name="T20"><text:span text:style-name="Strong_20_Emphasis"><text:span text:style-name="T16">1- </text:span></text:span><text:span text:style-name="Strong_20_Emphasis"><text:span text:style-name="T11">O caractere de barra vertical (</text:span></text:span><text:span text:style-name="Strong_20_Emphasis"><text:span text:style-name="Source_20_Text"><text:span text:style-name="T19">|</text:span></text:span></text:span><text:span text:style-name="Strong_20_Emphasis"><text:span text:style-name="T11">) representa o </text:span></text:span><text:span text:style-name="Strong_20_Emphasis"><text:span text:style-name="T17">pipe</text:span></text:span><text:span text:style-name="Strong_20_Emphasis"><text:span text:style-name="T11">, que conecta a saída de dados de um comando diretamente à entrada de outro. Ao testar os exemplos, compreende-se como listas massivas de dados de comandos como o </text:span></text:span><text:span text:style-name="Strong_20_Emphasis"><text:span text:style-name="Source_20_Text"><text:span text:style-name="T19">ps -aux</text:span></text:span></text:span><text:span text:style-name="Strong_20_Emphasis"><text:span text:style-name="T11"> são filtradas, ordenadas ou paginadas pelo comando seguinte (como o </text:span></text:span><text:span text:style-name="Strong_20_Emphasis"><text:span text:style-name="Source_20_Text"><text:span text:style-name="T19">more</text:span></text:span></text:span><text:span text:style-name="Strong_20_Emphasis"><text:span text:style-name="T11">) para facilitar a leitura.</text:span></text:span></text:p>
      <text:p text:style-name="P19" loext:marker-style-name="T20"><text:span text:style-name="Strong_20_Emphasis"><text:span text:style-name="T14"/></text:span></text:p>
      <text:p text:style-name="P19" loext:marker-style-name="T20"><text:span text:style-name="Strong_20_Emphasis"><text:span text:style-name="T16">Resposta:</text:span></text:span></text:p>
      <text:p text:style-name="P19" loext:marker-style-name="T20"><draw:frame draw:style-name="fr1" draw:name="Image21" text:anchor-type="char" svg:width="16cm" svg:height="6.541cm" draw:z-index="20"><draw:image xlink:href="Pictures/10000001000003580000015E77A057E2.png" xlink:type="simple" xlink:show="embed" xlink:actuate="onLoad" draw:mime-type="image/png"/></draw:frame><text:span text:style-name="Strong_20_Emphasis"><text:span text:style-name="T16"/></text:span></text:p>
      <text:p text:style-name="P19" loext:marker-style-name="T20"><draw:frame draw:style-name="fr1" draw:name="Image22" text:anchor-type="char" svg:width="16cm" svg:height="7.742cm" draw:z-index="21"><draw:image xlink:href="Pictures/100000010000034900000197B4C5374A.png" xlink:type="simple" xlink:show="embed" xlink:actuate="onLoad" draw:mime-type="image/png"/></draw:frame><text:soft-page-break/><text:span text:style-name="Strong_20_Emphasis"><text:span text:style-name="T16"/></text:span></text:p>
      <text:p text:style-name="P19" loext:marker-style-name="T20"><text:span text:style-name="Strong_20_Emphasis"><text:span text:style-name="T16"/></text:span></text:p>
      <text:p text:style-name="P17" loext:marker-style-name="T20"><text:span text:style-name="Strong_20_Emphasis"><text:span text:style-name="T14">Exercício L: Execute os comandos nice e recine abaixo tire print de tela salvando as execuções. $ nice top O comando top é executado com NI = 10 e PR = 30, pois quando o valor NI não é especificado com o comando nice, assume-se que NI = 10. Neste caso, se o comando top tivesse sido chamado sem o comando nice, o sistema teria usado NI = 0 e PR = 20. $ nice -6 top ou nice -n 6 top //diminui a prioridade Neste caso, o comando é executado com NI = 6 e PR = 26. O comando sudo nice −−6 top ou sudo nice -n -6 top</text:span></text:span></text:p>
      <text:p text:style-name="P17" loext:marker-style-name="T20"><text:span text:style-name="Strong_20_Emphasis"><text:span text:style-name="T14"/></text:span></text:p>
      <text:p text:style-name="P19" loext:marker-style-name="T20"><text:span text:style-name="Strong_20_Emphasis"><text:span text:style-name="T16">1- </text:span></text:span><text:span text:style-name="Strong_20_Emphasis"><text:span text:style-name="T11">Manipula-se a prioridade de CPU através dos comandos </text:span></text:span><text:span text:style-name="Strong_20_Emphasis"><text:span text:style-name="Source_20_Text"><text:span text:style-name="T19">nice</text:span></text:span></text:span><text:span text:style-name="Strong_20_Emphasis"><text:span text:style-name="T11"> (para novos processos) e </text:span></text:span><text:span text:style-name="Strong_20_Emphasis"><text:span text:style-name="Source_20_Text"><text:span text:style-name="T19">renice</text:span></text:span></text:span><text:span text:style-name="Strong_20_Emphasis"><text:span text:style-name="T11"> (para processos já em execução), onde números menores significam maior prioridade real. O uso de valores positivos diminui a prioridade, enquanto valores negativos exigem privilégios de administrador e aumentam a prioridade de execução do processo no sistema.</text:span></text:span></text:p>
      <text:p text:style-name="P17" loext:marker-style-name="T20"><text:span text:style-name="Strong_20_Emphasis"><text:span text:style-name="T14"/></text:span></text:p>
      <text:p text:style-name="P17" loext:marker-style-name="T20"><text:span text:style-name="Strong_20_Emphasis"><text:span text:style-name="T14">Resposta: </text:span></text:span></text:p>
      <text:p text:style-name="P17" loext:marker-style-name="T20"><draw:frame draw:style-name="fr2" draw:name="Image19" text:anchor-type="char" svg:width="16cm" svg:height="1.473cm" draw:z-index="18"><draw:image xlink:href="Pictures/100000010000032E0000004BBFEFE390.png" xlink:type="simple" xlink:show="embed" xlink:actuate="onLoad" draw:mime-type="image/png"/></draw:frame><text:span text:style-name="Strong_20_Emphasis"><text:span text:style-name="T14"/></text:span></text:p>
      <text:p text:style-name="P17" loext:marker-style-name="T20"><draw:frame draw:style-name="fr1" draw:name="Image20" text:anchor-type="char" svg:width="16cm" svg:height="8.488cm" draw:z-index="19"><draw:image xlink:href="Pictures/1000000100000321000001A9B99D6310.png" xlink:type="simple" xlink:show="embed" xlink:actuate="onLoad" draw:mime-type="image/png"/></draw:frame><text:soft-page-break/><text:span text:style-name="Strong_20_Emphasis"><text:span text:style-name="T14"/></text:span></text:p>
      <text:p text:style-name="P17" loext:marker-style-name="T20"><text:span text:style-name="Strong_20_Emphasis"><text:span text:style-name="T14"/></text:span></text:p>
      <text:p text:style-name="P17" loext:marker-style-name="T20"><text:span text:style-name="Strong_20_Emphasis"><text:span text:style-name="T14"/></text:span></text:p>
      <text:p text:style-name="P17" loext:marker-style-name="T20"><text:span text:style-name="Strong_20_Emphasis"><text:span text:style-name="T14"/></text:span></text:p>
      <text:p text:style-name="P17" loext:marker-style-name="T20"><text:span text:style-name="Strong_20_Emphasis"><text:span text:style-name="T14">M) Para não perder o compromisso O comando date – O comando date exibe e edita a data e a hora atuais do sistema.</text:span></text:span></text:p>
      <text:p text:style-name="P17" loext:marker-style-name="T20"><text:span text:style-name="Strong_20_Emphasis"><text:span text:style-name="T14"/></text:span></text:p>
      <text:p text:style-name="P17" loext:marker-style-name="T20"><text:span text:style-name="Strong_20_Emphasis"><text:span text:style-name="T14">Resposta: </text:span></text:span></text:p>
      <text:p text:style-name="P17" loext:marker-style-name="T20"><text:span text:style-name="Strong_20_Emphasis"><text:span text:style-name="T14"/></text:span></text:p>
      <text:p text:style-name="P17" loext:marker-style-name="T20"><draw:frame draw:style-name="fr1" draw:name="Image18" text:anchor-type="char" svg:width="16cm" svg:height="2.588cm" draw:z-index="17"><draw:image xlink:href="Pictures/100000010000033600000085787BFD6A.png" xlink:type="simple" xlink:show="embed" xlink:actuate="onLoad" draw:mime-type="image/png"/></draw:frame><text:span text:style-name="Strong_20_Emphasis"><text:span text:style-name="T1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7T19:20:59.140716754</meta:creation-date>
    <dc:date>2026-06-17T18:58:42.966610030</dc:date>
    <meta:editing-duration>PT4H43M36S</meta:editing-duration>
    <meta:editing-cycles>44</meta:editing-cycles>
    <meta:generator>LibreOffice/24.2.7.2$Linux_X86_64 LibreOffice_project/420$Build-2</meta:generator>
    <meta:print-date>2026-03-17T20:09:11.925386122</meta:print-date>
    <meta:printed-by>PDF files</meta:printed-by>
    <meta:document-statistic meta:table-count="0" meta:image-count="27" meta:object-count="0" meta:page-count="17" meta:paragraph-count="88" meta:word-count="2224" meta:character-count="13224" meta:non-whitespace-character-count="11063"/>
  </office:meta>
</office:document-meta>
</file>